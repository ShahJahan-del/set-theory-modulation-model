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mposer (C)</text:p>
          </table:table-cell>
          <table:table-cell office:value-type="string" calcext:value-type="string">
            <text:p>Work (W)</text:p>
          </table:table-cell>
          <table:table-cell office:value-type="string" calcext:value-type="string">
            <text:p>Start_Set (SS)</text:p>
          </table:table-cell>
          <table:table-cell office:value-type="string" calcext:value-type="string">
            <text:p>Start_Transposition (ST)</text:p>
          </table:table-cell>
          <table:table-cell office:value-type="string" calcext:value-type="string">
            <text:p>Start_Mode (SM)</text:p>
          </table:table-cell>
          <table:table-cell office:value-type="string" calcext:value-type="string">
            <text:p>Target_Set (TS)</text:p>
          </table:table-cell>
          <table:table-cell office:value-type="string" calcext:value-type="string">
            <text:p>Target_Transposition (TT)</text:p>
          </table:table-cell>
          <table:table-cell office:value-type="string" calcext:value-type="string">
            <text:p>Target_Mode (TM)</text:p>
          </table:table-cell>
          <table:table-cell office:value-type="string" calcext:value-type="string">
            <text:p>Emotional_Effect (EE)</text:p>
          </table:table-cell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crian (A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<text:span text:style-name="T1">Phrygian Dominant</text:span> (D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<text:span text:style-name="T1">Phrygian Dominant </text:span>(G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<text:span text:style-name="T1">Phrygian Dominant </text:span>(G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Harmonic Minor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ndantino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(A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ixolydian (E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crian (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Deux_Arabesques_Allegretto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Whole T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T1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Whole T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T1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 office:value-type="string" calcext:value-type="string">
            <text:p>Hex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x(0, 3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ex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x(0, 3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eolian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eolian (A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rmonic Minor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b2 (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b2 (B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xolydian (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xolydian (B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lodic Minor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lodic Minor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ydian (E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ydian (E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D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ol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olian (D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rygian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rygian (A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orian b2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orian b2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ydian Augmented (A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ydian Augmented (A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2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Locrian (F#</text:span>)</text:p>
          </table:table-cell>
          <table:table-cell/>
        </table:table-row>
        <table:table-row table:style-name="ro2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Locrian (F#</text:span>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rygian Dominant (A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rian (A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rian (A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ol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ol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ol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ixolydian (A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ixolydian (A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ixolydian (D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ixolydian (D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rygian Dominant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xolyd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b6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b6 (E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b2 (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b2 (B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b6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xolydian b6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rygian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rygian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ian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xolydian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xolydian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ian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rygian (D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rygian (D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ian (C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ian (C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olian (G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olian (G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xolydian (E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xolydian (E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ydian Augmented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ydian Augmented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hrygian (G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hrygian (G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Phrygian (A#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Phrygian (A#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ocr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ixolydian (D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ixolydian (Db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jor #5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jor #5 (F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monic minor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monic minor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jor #5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jor #5 (F)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monic minor (D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Harmonic Mi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monic minor (D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ixolydian (F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n (Bb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Augmented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Augmented (F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Dominant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Dominant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Augmented (F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Augmented (F)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Dominant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ydian Dominant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ian (G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/>
        </table:table-row>
        <table:table-row table:style-name="ro1">
          <table:table-cell office:value-type="string" calcext:value-type="string">
            <text:p>Debussy</text:p>
          </table:table-cell>
          <table:table-cell office:value-type="string" calcext:value-type="string">
            <text:p>Ballade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xolydian (C)</text:p>
          </table:table-cell>
          <table:table-cell office:value-type="string" calcext:value-type="string">
            <text:p>Diato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8T15:27:25.756000000</meta:creation-date>
    <dc:date>2026-06-18T19:42:32.379000000</dc:date>
    <meta:editing-duration>PT2H21M45S</meta:editing-duration>
    <meta:editing-cycles>41</meta:editing-cycles>
    <meta:generator>LibreOffice/7.2.5.2$Windows_X86_64 LibreOffice_project/499f9727c189e6ef3471021d6132d4c694f357e5</meta:generator>
    <meta:document-statistic meta:table-count="1" meta:cell-count="1241" meta:object-count="0"/>
  </office:meta>
</office:document-meta>
</file>